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4"/>
          <table:table-cell office:value-type="string" calcext:value-type="string">
            <text:p>Compiler: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25" calcext:value-type="float">
            <text:p>0.125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13" calcext:value-type="float">
            <text:p>0.513</text:p>
          </table:table-cell>
          <table:table-cell table:number-columns-repeated="4"/>
          <table:table-cell office:value-type="string" calcext:value-type="string">
            <text:p>Flags:</text:p>
          </table:table-cell>
          <table:table-cell table:style-name="ce56" office:value-type="string" calcext:value-type="string">
            <text:p>-Wno-pedantic</text:p>
          </table:table-cell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496" calcext:value-type="float">
            <text:p>0.496</text:p>
          </table:table-cell>
          <table:table-cell table:number-columns-repeated="5"/>
          <table:table-cell table:style-name="ce57" office:value-type="string" calcext:value-type="string">
            <text:p>-D_POSIX_C_SOURCE=200809L</text:p>
          </table:table-cell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11" calcext:value-type="float">
            <text:p>0.511</text:p>
          </table:table-cell>
          <table:table-cell table:number-columns-repeated="5"/>
          <table:table-cell table:style-name="ce56" office:value-type="string" calcext:value-type="string">
            <text:p>-fno-semantic-interposition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1" calcext:value-type="float">
            <text:p>0.510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/>
          <table:table-cell table:style-name="ce56" office:value-type="string" calcext:value-type="string">
            <text:p>-fprofile-use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1" calcext:value-type="float">
            <text:p>0.510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  <table:table-cell table:number-columns-repeated="2"/>
          <table:table-cell table:style-name="ce56" office:value-type="string" calcext:value-type="string">
            <text:p>-fprofile-correction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23" calcext:value-type="float">
            <text:p>0.123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497" calcext:value-type="float">
            <text:p>0.497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  <table:table-cell table:number-columns-repeated="2"/>
          <table:table-cell table:style-name="ce56" office:value-type="string" calcext:value-type="string">
            <text:p>-O3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21" calcext:value-type="float">
            <text:p>0.121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12" calcext:value-type="float">
            <text:p>0.512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/>
          <table:table-cell table:style-name="ce56" office:value-type="string" calcext:value-type="string">
            <text:p>-DNDEBUG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14" calcext:value-type="float">
            <text:p>0.514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  <table:table-cell table:number-columns-repeated="2"/>
          <table:table-cell table:style-name="ce57" office:value-type="string" calcext:value-type="string">
            <text:p>-DNLOGINFO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126" calcext:value-type="float">
            <text:p>0.126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1" calcext:value-type="float">
            <text:p>0.510</text:p>
          </table:table-cell>
          <table:table-cell table:number-columns-repeated="5"/>
          <table:table-cell table:style-name="ce57" office:value-type="string" calcext:value-type="string">
            <text:p>-DNASSERT</text:p>
          </table:table-cell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125" calcext:value-type="float">
            <text:p>0.125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11" calcext:value-type="float">
            <text:p>0.511</text:p>
          </table:table-cell>
          <table:table-cell table:number-columns-repeated="5"/>
          <table:table-cell table:style-name="ce56" office:value-type="string" calcext:value-type="string">
            <text:p>-DNMXCSR</text:p>
          </table:table-cell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124" calcext:value-type="float">
            <text:p>0.124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084" calcext:value-type="float">
            <text:p>0.508</text:p>
          </table:table-cell>
          <table:table-cell office:value-type="string" calcext:value-type="string">
            <text:p>Avg (s)</text:p>
          </table:table-cell>
          <table:table-cell table:number-columns-repeated="5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32258064.516129" calcext:value-type="float">
            <text:p>3.23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86782061.369001" calcext:value-type="float">
            <text:p>7.87E+08</text:p>
          </table:table-cell>
          <table:table-cell office:value-type="string" calcext:value-type="string">
            <text:p>Avg (ev/s)</text:p>
          </table:table-cell>
          <table:table-cell table:number-columns-repeated="5"/>
        </table:table-row>
        <table:table-row table:style-name="ro1">
          <table:table-cell/>
          <table:table-cell table:style-name="ce14" table:formula="of:=[.A15]/[.B15]" office:value-type="float" office:value="44.525" calcext:value-type="float">
            <text:p>44.5</text:p>
          </table:table-cell>
          <table:table-cell/>
          <table:table-cell table:style-name="ce14" table:formula="of:=[.C15]/[.D15]" office:value-type="float" office:value="49.0753343823761" calcext:value-type="float">
            <text:p>49.1</text:p>
          </table:table-cell>
          <table:table-cell office:value-type="string" calcext:value-type="string">
            <text:p>Speedup factor</text:p>
          </table:table-cell>
          <table:table-cell table:number-columns-repeated="5"/>
        </table:table-row>
        <table:table-row table:style-name="ro1">
          <table:table-cell/>
          <table:table-cell table:style-name="ce15" table:formula="of:=([.B16]-[.A16])/[.A16]" office:value-type="percentage" office:value="43.525" calcext:value-type="percentage">
            <text:p>4353%</text:p>
          </table:table-cell>
          <table:table-cell/>
          <table:table-cell table:style-name="ce15" table:formula="of:=([.D16]-[.C16])/[.C16]" office:value-type="percentage" office:value="48.0753343823761" calcext:value-type="percentage">
            <text:p>4808%</text:p>
          </table:table-cell>
          <table:table-cell office:value-type="string" calcext:value-type="string">
            <text:p>Percent more events per second</text:p>
          </table:table-cell>
          <table:table-cell table:number-columns-repeated="5"/>
        </table:table-row>
        <table:table-row table:style-name="ro1">
          <table:table-cell/>
          <table:table-cell table:style-name="ce16" table:formula="of:=([.B15]-[.A15])/[.A15]" office:value-type="percentage" office:value="-0.977540707467715" calcext:value-type="percentage">
            <text:p>-97.8%</text:p>
          </table:table-cell>
          <table:table-cell/>
          <table:table-cell table:style-name="ce16" table:formula="of:=([.D15]-[.C15])/[.C15]" office:value-type="percentage" office:value="-0.979623164822304" calcext:value-type="percentage">
            <text:p>-98.0%</text:p>
          </table:table-cell>
          <table:table-cell office:value-type="string" calcext:value-type="string">
            <text:p>Percent shorter run tim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5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5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37" office:value-type="string" calcext:value-type="string">
            <text:p>For charting</text:p>
          </table:table-cell>
          <table:table-cell table:style-name="ce37" table:number-columns-repeated="2"/>
          <table:table-cell table:number-columns-repeated="7"/>
        </table:table-row>
        <table:table-row table:style-name="ro1"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/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 table:number-columns-repeated="3"/>
        </table:table-row>
        <table:table-row table:style-name="ro1">
          <table:table-cell table:style-name="ce37"/>
          <table:table-cell table:style-name="ce37" table:formula="of:=[.A4]" office:value-type="string" office:string-value="SimPy" calcext:value-type="string">
            <text:p>SimPy</text:p>
          </table:table-cell>
          <table:table-cell table:style-name="ce37" table:formula="of:=[.B4]" office:value-type="string" office:string-value="Cimba" calcext:value-type="string">
            <text:p>Cimba</text:p>
          </table:table-cell>
          <table:table-cell/>
          <table:table-cell table:style-name="ce37"/>
          <table:table-cell table:style-name="ce37" table:formula="of:=[.C4]" office:value-type="string" office:string-value="SimPy" calcext:value-type="string">
            <text:p>SimPy</text:p>
          </table:table-cell>
          <table:table-cell table:style-name="ce37" table:formula="of:=[.D4]" office:value-type="string" office:string-value="Cimba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7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32258064.516129" calcext:value-type="float">
            <text:p>3.23E+07</text:p>
          </table:table-cell>
          <table:table-cell/>
          <table:table-cell table:style-name="ce37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86782061.369001" calcext:value-type="float">
            <text:p>7.87E+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08:12:13.053069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4-22T21:25:48.067122089</dc:date>
    <meta:editing-duration>P3DT15H9M33S</meta:editing-duration>
    <meta:editing-cycles>8</meta:editing-cycles>
    <meta:generator>LibreOffice/26.2.2.2$Linux_X86_64 LibreOffice_project/620$Build-2</meta:generator>
    <meta:document-statistic meta:table-count="1" meta:cell-count="11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32258064.516129">
                <text:p>32258064.516129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86782061.369001">
                <text:p>786782061.369001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